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1000001AA1464717D4B0E46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, sans-serif"/>
    <style:font-face style:name="DejaVu Sans" svg:font-family="'DejaVu Sans'" style:font-family-generic="swiss" style:font-pitch="variable"/>
    <style:font-face style:name="Inter" svg:font-family="Inter, ui-sans-serif, system-ui, apple-system, BlinkMacSystemFont, 'Segoe UI', Roboto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Liberation Serif" fo:font-size="20pt" fo:font-weight="bold" officeooo:rsid="00097156" officeooo:paragraph-rsid="00097156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000000" loext:opacity="100%" style:font-name="Inter" fo:font-size="9pt" fo:letter-spacing="normal" fo:font-style="italic" fo:font-weight="normal" officeooo:rsid="00097156" officeooo:paragraph-rsid="00097156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T1" style:family="text">
      <style:text-properties officeooo:rsid="0009848c"/>
    </style:style>
    <style:style style:name="T2" style:family="text">
      <style:text-properties officeooo:rsid="000b0e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x="1.423cm" svg:y="2.037cm" svg:width="14.42cm" svg:height="11.271cm" draw:z-index="0"><draw:image xlink:href="Pictures/1000000100000221000001AA1464717D4B0E4671.png" xlink:type="simple" xlink:show="embed" xlink:actuate="onLoad" draw:mime-type="image/png"/></draw:frame>1. Specification Intelligence</text:p>
      <text:p text:style-name="P1"/>
      <text:p text:style-name="P1"/>
      <text:p text:style-name="P2">/home/tcs/genai_setups/5G_RCA_Electron_New_UI/Backend/resources/extract/datasets/LTE/5G NSA attach and detach of single UE/total_content.txt (searched under Backend/resources/extract)</text:p>
      <text:p text:style-name="P2"/>
      <text:p text:style-name="P2"/>
      <text:p text:style-name="P2"/>
      <text:p text:style-name="P2"/>
      <text:p text:style-name="P2"/>
      <text:p text:style-name="P2">Upload → extract text → split into chunks</text:p>
      <text:p text:style-name="P2"><text:s text:c="11"/>↓</text:p>
      <text:p text:style-name="P2"><text:s text:c="4"/>Layer 1 (<text:span text:style-name="T1">Deterministic approach</text:span>) on ALL chunks <text:s text:c="4"/>← fast, deterministic</text:p>
      <text:p text:style-name="P2"><text:s text:c="11"/>↓</text:p>
      <text:p text:style-name="P2"><text:s text:c="4"/>Suspicious? ──No──→ skip (clean chunk, continue)</text:p>
      <text:p text:style-name="P2"><text:s text:c="11"/>│</text:p>
      <text:p text:style-name="P2"><text:s text:c="10"/>Yes</text:p>
      <text:p text:style-name="P2"><text:s text:c="11"/>↓</text:p>
      <text:p text:style-name="P2"><text:s text:c="4"/>Layer 2 (Llama Guard- <text:span text:style-name="T1">model based approach</text:span>) on that chunk only <text:s/>← ML</text:p>
      <text:p text:style-name="P2"><text:s text:c="11"/>↓</text:p>
      <text:p text:style-name="P2"><text:s text:c="4"/>Any chunk unsafe? → REJECT document</text:p>
      <text:p text:style-name="P2"><text:s text:c="4"/>All clear? <text:s text:c="7"/>→ ACCEP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LLM Output</text:p>
      <text:p text:style-name="P2"><text:s text:c="5"/>↓</text:p>
      <text:p text:style-name="P2"><draw:line text:anchor-type="paragraph" draw:z-index="1" draw:name="Line 1" draw:style-name="gr2" draw:text-style-name="P3" svg:x1="3.473cm" svg:y1="0.064cm" svg:x2="5.934cm" svg:y2="0.117cm"><text:p/></draw:line><draw:line text:anchor-type="paragraph" draw:z-index="3" draw:name="Line 3" draw:style-name="gr2" draw:text-style-name="P3" svg:x1="5.934cm" svg:y1="0.169cm" svg:x2="6.066cm" svg:y2="1.677cm"><text:p/></draw:line>Schema Validator</text:p>
      <text:p text:style-name="P2"><text:s text:c="5"/>↓</text:p>
      <text:p text:style-name="P2"><draw:line text:anchor-type="paragraph" draw:z-index="4" draw:name="Line 4" draw:style-name="gr1" draw:text-style-name="P3" svg:x1="6.066cm" svg:y1="0.117cm" svg:x2="7.098cm" svg:y2="0.064cm"><text:p/></draw:line>Hierarchy Validator <text:s text:c="41"/><text:span text:style-name="T2">Output Guardrails</text:span></text:p>
      <text:p text:style-name="P2"><text:s text:c="5"/>↓</text:p>
      <text:p text:style-name="P2"><draw:line text:anchor-type="paragraph" draw:z-index="2" draw:name="Line 2" draw:style-name="gr2" draw:text-style-name="P3" svg:x1="4.981cm" svg:y1="0.196cm" svg:x2="6.066cm" svg:y2="0.143cm"><text:p/></draw:line>Source Traceability Validator</text:p>
      <text:p text:style-name="P2"><text:s text:c="5"/>↓</text:p>
      <text:p text:style-name="P2">Save Datas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, sans-serif"/>
    <style:font-face style:name="DejaVu Sans" svg:font-family="'DejaVu Sans'" style:font-family-generic="swiss" style:font-pitch="variable"/>
    <style:font-face style:name="Inter" svg:font-family="Inter, ui-sans-serif, system-ui, apple-system, BlinkMacSystemFont, 'Segoe UI', Roboto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0T12:47:12.447812361</meta:creation-date>
    <dc:date>2026-06-12T11:31:54.834114051</dc:date>
    <meta:editing-duration>PT19H8M40S</meta:editing-duration>
    <meta:editing-cycles>1</meta:editing-cycles>
    <meta:document-statistic meta:table-count="0" meta:image-count="1" meta:object-count="0" meta:page-count="2" meta:paragraph-count="23" meta:word-count="84" meta:character-count="764" meta:non-whitespace-character-count="545"/>
    <meta:generator>LibreOffice/7.3.7.2$Linux_X86_64 LibreOffice_project/30$Build-2</meta:generator>
  </office:meta>
</office:document-meta>
</file>